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97c" officeooo:paragraph-rsid="0010997c"/>
    </style:style>
    <style:style style:name="P2" style:family="paragraph" style:parent-style-name="Standard">
      <style:text-properties officeooo:rsid="00122905" officeooo:paragraph-rsid="00122905"/>
    </style:style>
    <style:style style:name="P3" style:family="paragraph" style:parent-style-name="Standard">
      <style:text-properties officeooo:rsid="00123e56" officeooo:paragraph-rsid="00123e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grok: 3GfzUK2deJEzGPSU3U6xFzvTX7t_3suoqDa59JbVx8GhHFqYz</text:p>
      <text:p text:style-name="P1"/>
      <text:p text:style-name="P1"/>
      <text:p text:style-name="P2">nhs: </text:p>
      <text:p text:style-name="P2">key: xoLbFEuA8GFZuETfrwLAx0vJqJQQdqmy</text:p>
      <text:p text:style-name="P2">secret: KHil3MKTP5zGPawJ</text:p>
      <text:p text:style-name="P2"/>
      <text:p text:style-name="P2">nhs mock user: tutorialuser</text:p>
      <text:p text:style-name="P2"/>
      <text:p text:style-name="P2"/>
      <text:p text:style-name="P3">openai api: sk-proj-qdcC3AaQ_rJlR6K9K8X6ZaIc_wBu7StBvLn_qTSM28lZ-6RfVG3ubyYVPvkpAhWffnuHp5TcJ-T3BlbkFJYnEGC_Gt-YGuEvx_7e2DHYfSDwDQ1_0HIkpGw_t_thZwY8hfN-J2dtSZEc25TAncNivM3EEg4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8T13:24:08.895816683</meta:creation-date>
    <dc:date>2026-07-18T13:58:02.352153008</dc:date>
    <meta:editing-duration>PT33M2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14" meta:character-count="325" meta:non-whitespace-character-count="316"/>
  </office:meta>
</office:document-meta>
</file>